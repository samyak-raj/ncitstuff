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7E000002EE9F76E8DA.png" manifest:media-type="image/png"/>
  <manifest:file-entry manifest:full-path="Pictures/10000001000005A00000032E73261C2B.png" manifest:media-type="image/png"/>
  <manifest:file-entry manifest:full-path="Pictures/1000000100000558000002F0309BD332.png" manifest:media-type="image/png"/>
  <manifest:file-entry manifest:full-path="Pictures/10000001000005800000036A7BA22640.png" manifest:media-type="image/png"/>
  <manifest:file-entry manifest:full-path="Pictures/1000000100000532000003563B1B1266.png" manifest:media-type="image/png"/>
  <manifest:file-entry manifest:full-path="Pictures/100000010000058E000004145DAA952F.png" manifest:media-type="image/png"/>
  <manifest:file-entry manifest:full-path="Pictures/1000000100000550000002FCBD73210F.png" manifest:media-type="image/png"/>
  <manifest:file-entry manifest:full-path="Pictures/1000000100000578000002F2C22D2F54.png" manifest:media-type="image/png"/>
  <manifest:file-entry manifest:full-path="Pictures/100000010000054E0000028C5FF76DE3.png" manifest:media-type="image/png"/>
  <manifest:file-entry manifest:full-path="Pictures/1000000100000574000003361F3AAB82.png" manifest:media-type="image/png"/>
  <manifest:file-entry manifest:full-path="Pictures/100000010000054C000003A4BD020290.png" manifest:media-type="image/png"/>
  <manifest:file-entry manifest:full-path="Pictures/10000001000005720000036AEB46F699.png" manifest:media-type="image/png"/>
  <manifest:file-entry manifest:full-path="Pictures/100000010000052600000308C136B466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1.277cm" loext:decorative="false"/>
      <style:paragraph-properties style:writing-mode="lr-tb"/>
    </style:style>
    <style:style style:name="pr5" style:family="presentation" style:parent-style-name="Default-title">
      <style:graphic-properties fo:min-height="3.89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Evaluating Time Complexit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Single Loop</text:span></text:p>
          </draw:text-box>
        </draw:frame>
        <draw:frame draw:style-name="gr2" draw:text-style-name="P4" draw:layer="layout" svg:width="19.629cm" svg:height="11.557cm" svg:x="3.866cm" svg:y="2.54cm">
          <draw:image xlink:href="Pictures/100000010000052600000308C136B4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<text:span text:style-name="T1">Loop with Constant Work Inside</text:span></text:p>
          </draw:text-box>
        </draw:frame>
        <draw:frame draw:style-name="gr2" draw:text-style-name="P4" draw:layer="layout" svg:width="20.736cm" svg:height="13.001cm" svg:x="1.905cm" svg:y="2.749cm">
          <draw:image xlink:href="Pictures/10000001000005720000036AEB46F6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<text:span text:style-name="T1">Nested Loop (n × n)</text:span></text:p>
          </draw:text-box>
        </draw:frame>
        <draw:frame draw:style-name="gr2" draw:text-style-name="P4" draw:layer="layout" svg:width="18.3cm" svg:height="12.578cm" svg:x="5.08cm" svg:y="2.662cm">
          <draw:image xlink:href="Pictures/100000010000054C000003A4BD0202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27cm" svg:y="0cm" presentation:class="title" presentation:user-transformed="true">
          <draw:text-box>
            <text:p text:style-name="P2"><text:span text:style-name="T1">Nested Loop with Different Limits</text:span></text:p>
          </draw:text-box>
        </draw:frame>
        <draw:frame draw:style-name="gr2" draw:text-style-name="P4" draw:layer="layout" svg:width="22.024cm" svg:height="12.967cm" svg:x="3.175cm" svg:y="2.243cm">
          <draw:image xlink:href="Pictures/1000000100000574000003361F3AAB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27cm" svg:y="-0.635cm" presentation:class="title" presentation:user-transformed="true">
          <draw:text-box>
            <text:p text:style-name="P2"><text:span text:style-name="T1">Triangular Nested Loop</text:span></text:p>
          </draw:text-box>
        </draw:frame>
        <draw:frame draw:style-name="gr2" draw:text-style-name="P4" draw:layer="layout" svg:width="19.054cm" svg:height="12.235cm" svg:x="3.81cm" svg:y="2.54cm">
          <draw:image xlink:href="Pictures/1000000100000532000003563B1B12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5.199cm" svg:height="1.277cm" svg:x="1.4cm" svg:y="0.628cm" presentation:class="title" presentation:user-transformed="true">
          <draw:text-box>
            <text:p text:style-name="P2"><text:span text:style-name="T1">Loop That Halves the Input (Logarithmic)</text:span></text:p>
          </draw:text-box>
        </draw:frame>
        <draw:frame draw:style-name="gr2" draw:text-style-name="P4" draw:layer="layout" svg:width="19.801cm" svg:height="11.123cm" svg:x="3.059cm" svg:y="2.212cm">
          <draw:image xlink:href="Pictures/1000000100000550000002FCBD7321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5.199cm" svg:height="1.277cm" svg:x="1.4cm" svg:y="0.628cm" presentation:class="title" presentation:user-transformed="true">
          <draw:text-box>
            <text:p text:style-name="P2"><text:span text:style-name="T1">Loop That Doubles the Counter</text:span></text:p>
          </draw:text-box>
        </draw:frame>
        <draw:frame draw:style-name="gr2" draw:text-style-name="P4" draw:layer="layout" svg:width="18.415cm" svg:height="9.918cm" svg:x="3.81cm" svg:y="2.388cm">
          <draw:image xlink:href="Pictures/1000000100000578000002F2C22D2F54.png" xlink:type="simple" xlink:show="embed" xlink:actuate="onLoad" draw:mime-type="image/png">
            <text:p/>
          </draw:image>
        </draw:frame>
        <draw:frame draw:style-name="gr3" draw:text-style-name="P6" draw:layer="layout" svg:width="19.05cm" svg:height="3.806cm" svg:x="5.08cm" svg:y="12.065cm">
          <draw:text-box>
            <text:p>n → n/2 → n/4 → n/8 → n/16 → ... → 1</text:p>
            <text:p>n / 2^k = 1</text:p>
            <text:p>n = 2^k</text:p>
            <text:p>k = log₂ n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-0.089cm" presentation:class="title" presentation:user-transformed="true">
          <draw:text-box>
            <text:p text:style-name="P2"><text:span text:style-name="T1">Loop Inside a Log Loop</text:span></text:p>
          </draw:text-box>
        </draw:frame>
        <draw:frame draw:style-name="gr2" draw:text-style-name="P4" draw:layer="layout" svg:width="21.494cm" svg:height="13.342cm" svg:x="2.636cm" svg:y="2.327cm">
          <draw:image xlink:href="Pictures/10000001000005800000036A7BA22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5" draw:layer="layout" svg:width="25.199cm" svg:height="3.892cm" svg:x="1.4cm" svg:y="-0.635cm" presentation:class="title" presentation:user-transformed="true">
          <draw:text-box>
            <text:p text:style-name="P2"><text:span text:style-name="T1">Two Separate Loops (Not Nested)</text:span></text:p>
          </draw:text-box>
        </draw:frame>
        <draw:frame draw:style-name="gr2" draw:text-style-name="P4" draw:layer="layout" svg:width="17.898cm" svg:height="13.14cm" svg:x="3.057cm" svg:y="2.54cm">
          <draw:image xlink:href="Pictures/100000010000058E000004145DAA95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9cm" svg:height="1.277cm" svg:x="1.4cm" svg:y="0.628cm" presentation:class="title" presentation:user-transformed="true">
          <draw:text-box>
            <text:p text:style-name="P2"><text:span text:style-name="T1">Constant Time Code</text:span></text:p>
          </draw:text-box>
        </draw:frame>
        <draw:frame draw:style-name="gr2" draw:text-style-name="P4" draw:layer="layout" svg:width="23.047cm" svg:height="12.669cm" svg:x="2.988cm" svg:y="1.936cm">
          <draw:image xlink:href="Pictures/1000000100000558000002F0309BD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<text:span text:style-name="T1">Recursive Example</text:span></text:p>
          </draw:text-box>
        </draw:frame>
        <draw:frame draw:style-name="gr2" draw:text-style-name="P4" draw:layer="layout" svg:width="21.142cm" svg:height="11.95cm" svg:x="1.083cm" svg:y="3.189cm">
          <draw:image xlink:href="Pictures/10000001000005A00000032E73261C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<text:span text:style-name="T1">Recursive Example (Divide and Conquer)</text:span></text:p>
          </draw:text-box>
        </draw:frame>
        <draw:frame draw:style-name="gr2" draw:text-style-name="P4" draw:layer="layout" svg:width="15.323cm" svg:height="8.173cm" svg:x="5.715cm" svg:y="3.257cm">
          <draw:image xlink:href="Pictures/100000010000057E000002EE9F76E8DA.png" xlink:type="simple" xlink:show="embed" xlink:actuate="onLoad" draw:mime-type="image/png">
            <text:p/>
          </draw:image>
        </draw:frame>
        <draw:frame draw:style-name="gr4" draw:text-style-name="P6" draw:layer="layout" svg:width="20.32cm" svg:height="3.81cm" svg:x="5.08cm" svg:y="11.43cm">
          <draw:text-box>
            <text:p>n → n/2 → n/4 → n/8 → ... → 1</text:p>
            <text:p>n / 2^k = 1</text:p>
            <text:p>n = 2^k</text:p>
            <text:p>k = log₂ n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5.199cm" svg:height="1.277cm" svg:x="1.4cm" svg:y="0.628cm" presentation:class="title" presentation:user-transformed="true">
          <draw:text-box>
            <text:p text:style-name="P2"><text:span text:style-name="T1">Summary</text:span></text:p>
          </draw:text-box>
        </draw:frame>
        <draw:frame draw:style-name="gr2" draw:text-style-name="P4" draw:layer="layout" svg:width="23.953cm" svg:height="11.5cm" svg:x="2.18cm" svg:y="2.211cm">
          <draw:image xlink:href="Pictures/100000010000054E0000028C5FF76D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21:13:43.371789000</meta:creation-date>
    <meta:editing-duration>PT5M6S</meta:editing-duration>
    <meta:editing-cycles>3</meta:editing-cycles>
    <meta:generator>LibreOffice/25.8.2.2$MacOSX_X86_64 LibreOffice_project/d401f2107ccab8f924a8e2df40f573aab7605b6f</meta:generator>
    <dc:date>2026-02-08T21:18:47.056205000</dc:date>
    <meta:document-statistic meta:object-count="78"/>
  </office:meta>
</office:document-meta>
</file>